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917in" table:align="left"/>
    </style:style>
    <style:style style:name="Table1.A" style:family="table-column">
      <style:table-column-properties style:column-width="1.9861in"/>
    </style:style>
    <style:style style:name="Table1.B" style:family="table-column">
      <style:table-column-properties style:column-width="3.105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tyle="italic"/>
    </style:style>
    <style:style style:name="P8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5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16" style:family="paragraph" style:parent-style-name="Standard">
      <style:text-properties officeooo:rsid="001b5966" officeooo:paragraph-rsid="001b5966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officeooo:rsid="001d6599"/>
    </style:style>
    <style:style style:name="T3" style:family="text">
      <style:text-properties fo:font-weight="bold"/>
    </style:style>
    <style:style style:name="T4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Bước 1: Cập nhật tình hình (Pull)</text:h>
      <text:p text:style-name="P2">Trước khi bạn định sửa gì, hãy lấy code mới nhất mà đồng đội đã đưa lên về máy mình:</text:p>
      <text:list text:style-name="L1">
        <text:list-item>
          <text:p text:style-name="P3"><text:span text:style-name="T1">Chuyển về nhánh chính: </text:span><text:span text:style-name="Source_20_Text"><text:span text:style-name="T1">git checkout main</text:span></text:span></text:p>
        </text:list-item>
        <text:list-item>
          <text:p text:style-name="P3"><text:span text:style-name="T1">Kéo code mới nhất: </text:span><text:span text:style-name="Source_20_Text"><text:span text:style-name="T1">git pull origin main</text:span></text:span></text:p>
        </text:list-item>
      </text:list>
      <text:p text:style-name="Horizontal_20_Line"/>
      <text:h text:style-name="P4" text:outline-level="3">Bước 2: Tạo "vùng an toàn" (Branch)</text:h>
      <text:p text:style-name="P5"><text:span text:style-name="T1">Đừng bao giờ sửa code trực tiếp trên nhánh </text:span><text:span text:style-name="Source_20_Text"><text:span text:style-name="T1">main</text:span></text:span><text:span text:style-name="T1">. Hãy tạo một nhánh riêng cho mình:</text:span></text:p>
      <text:list text:style-name="L2">
        <text:list-item>
          <text:p text:style-name="P6"><text:span text:style-name="Source_20_Text"><text:span text:style-name="T1">git checkout -b feature-ten-cua-bạn / </text:span></text:span><text:span text:style-name="Source_20_Text"><text:span text:style-name="T2">git checkout branch_cua_minh</text:span></text:span></text:p>
        </text:list-item>
        <text:list-item>
          <text:p text:style-name="P6"><text:span text:style-name="Source_20_Text"><text:span text:style-name="T1">git merge main </text:span></text:span></text:p>
          <text:p text:style-name="P7">(Lệnh này giúp bạn vừa tạo nhánh mới, vừa nhảy sang nhánh đó luôn).</text:p>
        </text:list-item>
      </text:list>
      <text:p text:style-name="Horizontal_20_Line"/>
      <text:h text:style-name="P4" text:outline-level="3">Bước 3: Code và Lưu (Add &amp; Commit)</text:h>
      <text:p text:style-name="P2">Sau khi bạn đã code xong xuôi một tính năng hoặc sửa xong lỗi:</text:p>
      <text:list text:style-name="L3">
        <text:list-item>
          <text:p text:style-name="P8"><text:span text:style-name="T1">Gom các file đã sửa: </text:span><text:span text:style-name="Source_20_Text"><text:span text:style-name="T1">git add .</text:span></text:span></text:p>
        </text:list-item>
        <text:list-item>
          <text:p text:style-name="P8"><text:span text:style-name="T1">Dán nhãn cho những thay đổi đó: </text:span><text:span text:style-name="Source_20_Text"><text:span text:style-name="T1">git commit -m "Mô tả việc bạn vừa làm"</text:span></text:span></text:p>
          <text:p text:style-name="P8"><text:span text:style-name="T1">*(Ví dụ: </text:span><text:span text:style-name="Source_20_Text"><text:span text:style-name="T1">git commit -m "Sửa lỗi hiển thị nút bấm"</text:span></text:span><text:span text:style-name="T1">) *</text:span></text:p>
        </text:list-item>
      </text:list>
      <text:p text:style-name="Horizontal_20_Line"/>
      <text:h text:style-name="P4" text:outline-level="3">Bước 4: Đưa lên GitHub (Push)</text:h>
      <text:p text:style-name="P2">Bây giờ bạn đẩy cái nhánh riêng của mình lên Repo chung trên GitHub:</text:p>
      <text:list text:style-name="L4">
        <text:list-item>
          <text:p text:style-name="P9"><text:span text:style-name="Source_20_Text"><text:span text:style-name="T1">git push origin feature-ten-cua-bạn</text:span></text:span></text:p>
        </text:list-item>
      </text:list>
      <text:p text:style-name="Horizontal_20_Line"/>
      <text:h text:style-name="P4" text:outline-level="3">Bước 5: Xin phép gộp code (Pull Request - PR)</text:h>
      <text:p text:style-name="P2">Bước này làm trên giao diện web GitHub:</text:p>
      <text:list text:style-name="L5">
        <text:list-item>
          <text:p text:style-name="P10">Vào link Repo của nhóm.</text:p>
        </text:list-item>
        <text:list-item>
          <text:p text:style-name="P10">Bạn sẽ thấy nút màu xanh <text:span text:style-name="T3">"Compare &amp; pull request"</text:span> hiện lên, hãy nhấn vào đó.</text:p>
        </text:list-item>
        <text:list-item>
          <text:p text:style-name="P10">Viết vài dòng mô tả (nếu cần) và nhấn <text:span text:style-name="T3">"Create pull request"</text:span>.</text:p>
        </text:list-item>
        <text:list-item>
          <text:p text:style-name="P11"><text:span text:style-name="T1">Bây giờ chỉ cần chờ "Chủ xị" (Leader) vào nhấn nút </text:span><text:span text:style-name="T4">Merge</text:span><text:span text:style-name="T1"> là code của bạn sẽ chính thức nằm trong nhánh </text:span><text:span text:style-name="Source_20_Text"><text:span text:style-name="T1">main</text:span></text:span><text:span text:style-name="T1">.</text:span></text:p>
        </text:list-item>
      </text:list>
      <text:p text:style-name="Horizontal_20_Line"/>
      <text:h text:style-name="P4" text:outline-level="3"><text:soft-page-break/>Tóm tắt bộ lệnh "Thần chú" cho bạ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<text:span text:style-name="Strong_20_Emphasis"><text:span text:style-name="T1">Hành động</text:span></text:span></text:p>
            </table:table-cell>
            <table:table-cell table:style-name="Table1.A1" office:value-type="string">
              <text:p text:style-name="P12"><text:span text:style-name="Strong_20_Emphasis"><text:span text:style-name="T1">Lệnh Gi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3">Cập nhật code mới nhất</text:p>
          </table:table-cell>
          <table:table-cell table:style-name="Table1.A1" office:value-type="string">
            <text:p text:style-name="P14"><text:span text:style-name="Source_20_Text"><text:span text:style-name="T1">git pull origin main</text:span></text:span></text:p>
          </table:table-cell>
        </table:table-row>
        <table:table-row>
          <table:table-cell table:style-name="Table1.A1" office:value-type="string">
            <text:p text:style-name="P13">Tạo và sang nhánh mới</text:p>
          </table:table-cell>
          <table:table-cell table:style-name="Table1.A1" office:value-type="string">
            <text:p text:style-name="P14"><text:span text:style-name="Source_20_Text"><text:span text:style-name="T1">git checkout -b [tên_nhánh]</text:span></text:span></text:p>
          </table:table-cell>
        </table:table-row>
        <table:table-row>
          <table:table-cell table:style-name="Table1.A1" office:value-type="string">
            <text:p text:style-name="P13">Lưu code đã sửa</text:p>
          </table:table-cell>
          <table:table-cell table:style-name="Table1.A1" office:value-type="string">
            <text:p text:style-name="P14"><text:span text:style-name="Source_20_Text"><text:span text:style-name="T1">git add .</text:span></text:span><text:span text:style-name="T1"> sau đó </text:span><text:span text:style-name="Source_20_Text"><text:span text:style-name="T1">git commit -m "nhắn gửi"</text:span></text:span></text:p>
          </table:table-cell>
        </table:table-row>
        <table:table-row>
          <table:table-cell table:style-name="Table1.A1" office:value-type="string">
            <text:p text:style-name="P13">Đẩy code lên GitHub</text:p>
          </table:table-cell>
          <table:table-cell table:style-name="Table1.A1" office:value-type="string">
            <text:p text:style-name="P14"><text:span text:style-name="Source_20_Text"><text:span text:style-name="T1">git push origin [tên_nhánh]</text:span></text:span></text:p>
          </table:table-cell>
        </table:table-row>
      </table:table>
      <text:p text:style-name="P15"><text:span text:style-name="T4">Lưu ý cực kỳ quan trọng:</text:span><text:span text:style-name="T1"> Nếu bạn gõ </text:span><text:span text:style-name="Source_20_Text"><text:span text:style-name="T1">git push</text:span></text:span><text:span text:style-name="T1"> mà bị báo lỗi, khả năng cao là bạn chưa nhấn </text:span><text:span text:style-name="T4">"Accept Invitation"</text:span><text:span text:style-name="T1"> trong email mời tham gia Collaborator mà bạn mình gửi đâu. Check mail ngay nếu bị kẹt nhé!</text:span></text:p>
      <text:p text:style-name="P5"><text:span text:style-name="T1">Bạn đã sẵn sàng tạo nhánh đầu tiên chưa? Thử đặt tên nhánh là </text:span><text:span text:style-name="Source_20_Text"><text:span text:style-name="T1">dev-nguyen-anh-tuan</text:span></text:span><text:span text:style-name="T1"> xem sao!</text:span></text:p>
      <text:p text:style-name="Standard"/>
      <text:p text:style-name="Standard"/>
      <text:p text:style-name="P16">Cách clone về:</text:p>
      <text:p text:style-name="P16">git clone &lt;đường-dẫn-vừa-copy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4:51:45.782855100</meta:creation-date>
    <dc:date>2026-04-07T20:39:15.318654500</dc:date>
    <meta:editing-duration>PT3H19M58S</meta:editing-duration>
    <meta:editing-cycles>4</meta:editing-cycles>
    <meta:generator>LibreOffice/26.2.2.2$Windows_X86_64 LibreOffice_project/1f77d10d6938fd34972958f64b2bcfa54f8b1ba5</meta:generator>
    <meta:document-statistic meta:table-count="1" meta:image-count="0" meta:object-count="0" meta:page-count="2" meta:paragraph-count="38" meta:word-count="376" meta:character-count="1788" meta:non-whitespace-character-count="1461"/>
  </office:meta>
</office:document-meta>
</file>